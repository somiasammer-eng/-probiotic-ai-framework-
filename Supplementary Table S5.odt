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T2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6.5283in" fo:padding-top="0in" fo:padding-bottom="0in" fo:padding-left="0in" fo:padding-right="0in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9in" fo:min-width="0.3091in" fo:padding-top="0in" fo:padding-bottom="0in" fo:padding-left="0in" fo:padding-right="0in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5126in" fo:padding-top="0in" fo:padding-bottom="0in" fo:padding-left="0in" fo:padding-right="0in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6075in" fo:padding-top="0in" fo:padding-bottom="0in" fo:padding-left="0in" fo:padding-right="0in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4102in" fo:padding-top="0in" fo:padding-bottom="0in" fo:padding-left="0in" fo:padding-right="0in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589in" fo:padding-top="0in" fo:padding-bottom="0in" fo:padding-left="0in" fo:padding-right="0in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1.6673in" fo:padding-top="0in" fo:padding-bottom="0in" fo:padding-left="0in" fo:padding-right="0in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1.5744in" fo:padding-top="0in" fo:padding-bottom="0in" fo:padding-left="0in" fo:padding-right="0in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2717in" fo:padding-top="0in" fo:padding-bottom="0in" fo:padding-left="0in" fo:padding-right="0in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272in" fo:padding-top="0in" fo:padding-bottom="0in" fo:padding-left="0in" fo:padding-right="0in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8043in" fo:padding-top="0in" fo:padding-bottom="0in" fo:padding-left="0in" fo:padding-right="0in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5791in" fo:padding-top="0in" fo:padding-bottom="0in" fo:padding-left="0in" fo:padding-right="0in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5709in" fo:padding-top="0in" fo:padding-bottom="0in" fo:padding-left="0in" fo:padding-right="0in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3264in" fo:padding-top="0in" fo:padding-bottom="0in" fo:padding-left="0in" fo:padding-right="0in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1.0689in" fo:padding-top="0in" fo:padding-bottom="0in" fo:padding-left="0in" fo:padding-right="0in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01in" fo:min-width="0.5626in" fo:padding-top="0in" fo:padding-bottom="0in" fo:padding-left="0in" fo:padding-right="0in" loext:decorative="false" style:run-through="foreground"/>
      <style:paragraph-properties style:writing-mode="lr-tb"/>
    </style:style>
    <style:style style:name="gr19" style:family="graphic">
      <style:graphic-properties draw:stroke="solid" svg:stroke-width="0.0035in" svg:stroke-color="#808080" draw:marker-start="" draw:marker-end="" draw:stroke-linejoin="round" svg:stroke-linecap="butt" draw:fill="none" fo:padding-top="0.0016in" fo:padding-bottom="0.0016in" fo:padding-left="0.0016in" fo:padding-right="0.0016in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polygon draw:style-name="gr2" draw:text-style-name="P1" svg:width="6.6937in" svg:height="0.1756in" svg:x="0in" svg:y="0.0004in" svg:viewBox="0 0 17003 447" draw:points="0,447 17003,447 17003,0 0,0"><text:p/></draw:polygon><draw:polygon draw:style-name="gr2" draw:text-style-name="P1" svg:width="0.3047in" svg:height="0.174in" svg:x="0in" svg:y="0.1768in" svg:viewBox="0 0 775 443" draw:points="0,443 775,443 775,0 0,0"><text:p/></draw:polygon><draw:frame draw:style-name="gr3" draw:text-style-name="P3" svg:width="6.5287in" svg:height="0.1768in" svg:x="0.002in" svg:y="0.0071in"><draw:text-box><text:p text:style-name="P2"><text:span text:style-name="T1">Supplementary Table S5. Performance comparison of PLM predictions with traditional annotation </text:span></text:p></draw:text-box></draw:frame><draw:polygon draw:style-name="gr2" draw:text-style-name="P1" svg:width="0.5091in" svg:height="0.176in" svg:x="0.0193in" svg:y="0.4543in" svg:viewBox="0 0 1294 448" draw:points="0,448 1294,448 1294,0 0,0"><text:p/></draw:polygon><draw:frame draw:style-name="gr4" draw:text-style-name="P3" svg:width="0.3094in" svg:height="0.1768in" svg:x="0.002in" svg:y="0.1819in"><draw:text-box><text:p text:style-name="P2"><text:span text:style-name="T1">tools</text:span></text:p></draw:text-box></draw:frame><draw:polygon draw:style-name="gr2" draw:text-style-name="P1" svg:width="0.5992in" svg:height="0.176in" svg:x="1.811in" svg:y="0.4543in" svg:viewBox="0 0 1523 448" draw:points="0,448 1523,448 1523,0 0,0"><text:p/></draw:polygon><draw:frame draw:style-name="gr5" draw:text-style-name="P3" svg:width="0.513in" svg:height="0.1768in" svg:x="0.0209in" svg:y="0.461in"><draw:text-box><text:p text:style-name="P2"><text:span text:style-name="T1">Method</text:span></text:p></draw:text-box></draw:frame><draw:polygon draw:style-name="gr2" draw:text-style-name="P1" svg:width="0.4059in" svg:height="0.176in" svg:x="2.539in" svg:y="0.4543in" svg:viewBox="0 0 1032 448" draw:points="0,448 1032,448 1032,0 0,0"><text:p/></draw:polygon><draw:frame draw:style-name="gr6" draw:text-style-name="P3" svg:width="0.6079in" svg:height="0.1768in" svg:x="1.8118in" svg:y="0.461in"><draw:text-box><text:p text:style-name="P2"><text:span text:style-name="T1">Precision</text:span></text:p></draw:text-box></draw:frame><draw:polygon draw:style-name="gr2" draw:text-style-name="P1" svg:width="0.1689in" svg:height="0.176in" svg:x="3.0567in" svg:y="0.4543in" svg:viewBox="0 0 430 448" draw:points="0,448 430,448 430,0 0,0"><text:p/></draw:polygon><draw:frame draw:style-name="gr7" draw:text-style-name="P3" svg:width="0.4106in" svg:height="0.1768in" svg:x="2.5402in" svg:y="0.461in"><draw:text-box><text:p text:style-name="P2"><text:span text:style-name="T1">Recall</text:span></text:p></draw:text-box></draw:frame><draw:polygon draw:style-name="gr2" draw:text-style-name="P1" svg:width="0.0492in" svg:height="0.176in" svg:x="3.2264in" svg:y="0.4543in" svg:viewBox="0 0 126 448" draw:points="0,448 126,448 126,0 0,0"><text:p/></draw:polygon><draw:polygon draw:style-name="gr2" draw:text-style-name="P1" svg:width="0.3618in" svg:height="0.176in" svg:x="3.2764in" svg:y="0.4543in" svg:viewBox="0 0 920 448" draw:points="0,448 920,448 920,0 0,0"><text:p/></draw:polygon><draw:polygon draw:style-name="gr2" draw:text-style-name="P1" svg:width="0.3311in" svg:height="0.176in" svg:x="3.7665in" svg:y="0.4543in" svg:viewBox="0 0 842 448" draw:points="0,448 842,448 842,0 0,0"><text:p/></draw:polygon><draw:frame draw:style-name="gr8" draw:text-style-name="P3" svg:width="0.5894in" svg:height="0.1768in" svg:x="3.0583in" svg:y="0.461in"><draw:text-box><text:p text:style-name="P2"><text:span text:style-name="T1">F1-Score</text:span></text:p></draw:text-box></draw:frame><draw:polygon draw:style-name="gr2" draw:text-style-name="P1" svg:width="0.0492in" svg:height="0.176in" svg:x="4.0984in" svg:y="0.4543in" svg:viewBox="0 0 126 448" draw:points="0,448 126,448 126,0 0,0"><text:p/></draw:polygon><draw:polygon draw:style-name="gr2" draw:text-style-name="P1" svg:width="0.3398in" svg:height="0.176in" svg:x="4.1484in" svg:y="0.4543in" svg:viewBox="0 0 864 448" draw:points="0,448 864,448 864,0 0,0"><text:p/></draw:polygon><draw:polygon draw:style-name="gr2" draw:text-style-name="P1" svg:width="0.9035in" svg:height="0.176in" svg:x="4.6291in" svg:y="0.4543in" svg:viewBox="0 0 2296 448" draw:points="0,448 2296,448 2296,0 0,0"><text:p/></draw:polygon><draw:polygon draw:style-name="gr2" draw:text-style-name="P1" svg:width="0.7591in" svg:height="0.1744in" svg:x="0.0193in" svg:y="0.6701in" svg:viewBox="0 0 1929 444" draw:points="0,444 1929,444 1929,0 0,0"><text:p/></draw:polygon><draw:frame draw:style-name="gr9" draw:text-style-name="P3" svg:width="1.6677in" svg:height="0.1768in" svg:x="3.7681in" svg:y="0.461in"><draw:text-box><text:p text:style-name="P2"><text:span text:style-name="T1">AUC-ROC Matthews CC</text:span></text:p></draw:text-box></draw:frame><draw:polygon draw:style-name="gr2" draw:text-style-name="P1" svg:width="0.0508in" svg:height="0.1744in" svg:x="0.7791in" svg:y="0.6701in" svg:viewBox="0 0 130 444" draw:points="0,444 130,444 130,0 0,0"><text:p/></draw:polygon><draw:polygon draw:style-name="gr2" draw:text-style-name="P1" svg:width="0.7535in" svg:height="0.1744in" svg:x="0.8303in" svg:y="0.6701in" svg:viewBox="0 0 1915 444" draw:points="0,444 1915,444 1915,0 0,0"><text:p/></draw:polygon><draw:polygon draw:style-name="gr2" draw:text-style-name="P1" svg:width="0.2661in" svg:height="0.1744in" svg:x="1.811in" svg:y="0.6701in" svg:viewBox="0 0 677 444" draw:points="0,444 677,444 677,0 0,0"><text:p/></draw:polygon><draw:frame draw:style-name="gr10" draw:text-style-name="P3" svg:width="1.5748in" svg:height="0.1768in" svg:x="0.0209in" svg:y="0.676in"><draw:text-box><text:p text:style-name="P2"><text:span text:style-name="T1">PLM (ESM-2 + ProtT5)</text:span></text:p></draw:text-box></draw:frame><draw:polygon draw:style-name="gr2" draw:text-style-name="P1" svg:width="0.2657in" svg:height="0.1744in" svg:x="2.539in" svg:y="0.6701in" svg:viewBox="0 0 676 444" draw:points="0,444 676,444 676,0 0,0"><text:p/></draw:polygon><draw:frame draw:style-name="gr11" draw:text-style-name="P3" svg:width="0.2717in" svg:height="0.1768in" svg:x="1.8118in" svg:y="0.676in"><draw:text-box><text:p text:style-name="P2"><text:span text:style-name="T1">0.89</text:span></text:p></draw:text-box></draw:frame><draw:polygon draw:style-name="gr2" draw:text-style-name="P1" svg:width="0.2661in" svg:height="0.1744in" svg:x="3.0567in" svg:y="0.6701in" svg:viewBox="0 0 677 444" draw:points="0,444 677,444 677,0 0,0"><text:p/></draw:polygon><draw:frame draw:style-name="gr11" draw:text-style-name="P3" svg:width="0.2717in" svg:height="0.1768in" svg:x="2.5402in" svg:y="0.676in"><draw:text-box><text:p text:style-name="P2"><text:span text:style-name="T1">0.85</text:span></text:p></draw:text-box></draw:frame><draw:polygon draw:style-name="gr2" draw:text-style-name="P1" svg:width="0.2673in" svg:height="0.1744in" svg:x="3.7665in" svg:y="0.6701in" svg:viewBox="0 0 680 444" draw:points="0,444 680,444 680,0 0,0"><text:p/></draw:polygon><draw:frame draw:style-name="gr11" draw:text-style-name="P3" svg:width="0.2717in" svg:height="0.1768in" svg:x="3.0583in" svg:y="0.676in"><draw:text-box><text:p text:style-name="P2"><text:span text:style-name="T1">0.87</text:span></text:p></draw:text-box></draw:frame><draw:polygon draw:style-name="gr2" draw:text-style-name="P1" svg:width="0.2657in" svg:height="0.1744in" svg:x="4.6291in" svg:y="0.6701in" svg:viewBox="0 0 676 444" draw:points="0,444 676,444 676,0 0,0"><text:p/></draw:polygon><draw:frame draw:style-name="gr12" draw:text-style-name="P3" svg:width="0.2724in" svg:height="0.1768in" svg:x="3.7681in" svg:y="0.676in"><draw:text-box><text:p text:style-name="P2"><text:span text:style-name="T1">0.92</text:span></text:p></draw:text-box></draw:frame><draw:polygon draw:style-name="gr2" draw:text-style-name="P1" svg:width="0.798in" svg:height="0.176in" svg:x="0.0193in" svg:y="0.8835in" svg:viewBox="0 0 2028 448" draw:points="0,448 2028,448 2028,0 0,0"><text:p/></draw:polygon><draw:frame draw:style-name="gr12" draw:text-style-name="P3" svg:width="0.2724in" svg:height="0.1768in" svg:x="4.6299in" svg:y="0.676in"><draw:text-box><text:p text:style-name="P2"><text:span text:style-name="T1">0.74</text:span></text:p></draw:text-box></draw:frame><draw:polygon draw:style-name="gr2" draw:text-style-name="P1" svg:width="0.2661in" svg:height="0.176in" svg:x="1.811in" svg:y="0.8835in" svg:viewBox="0 0 677 448" draw:points="0,448 677,448 677,0 0,0"><text:p/></draw:polygon><draw:frame draw:style-name="gr13" draw:text-style-name="P3" svg:width="0.8043in" svg:height="0.1768in" svg:x="0.0209in" svg:y="0.8906in"><draw:text-box><text:p text:style-name="P2"><text:span text:style-name="T2">InterProScan</text:span></text:p></draw:text-box></draw:frame><draw:polygon draw:style-name="gr2" draw:text-style-name="P1" svg:width="0.2657in" svg:height="0.176in" svg:x="2.539in" svg:y="0.8835in" svg:viewBox="0 0 676 448" draw:points="0,448 676,448 676,0 0,0"><text:p/></draw:polygon><draw:frame draw:style-name="gr11" draw:text-style-name="P3" svg:width="0.2717in" svg:height="0.1768in" svg:x="1.8118in" svg:y="0.8906in"><draw:text-box><text:p text:style-name="P2"><text:span text:style-name="T2">0.82</text:span></text:p></draw:text-box></draw:frame><draw:polygon draw:style-name="gr2" draw:text-style-name="P1" svg:width="0.2661in" svg:height="0.176in" svg:x="3.0567in" svg:y="0.8835in" svg:viewBox="0 0 677 448" draw:points="0,448 677,448 677,0 0,0"><text:p/></draw:polygon><draw:frame draw:style-name="gr11" draw:text-style-name="P3" svg:width="0.2717in" svg:height="0.1768in" svg:x="2.5402in" svg:y="0.8906in"><draw:text-box><text:p text:style-name="P2"><text:span text:style-name="T2">0.71</text:span></text:p></draw:text-box></draw:frame><draw:polygon draw:style-name="gr2" draw:text-style-name="P1" svg:width="0.2673in" svg:height="0.176in" svg:x="3.7665in" svg:y="0.8835in" svg:viewBox="0 0 680 448" draw:points="0,448 680,448 680,0 0,0"><text:p/></draw:polygon><draw:frame draw:style-name="gr11" draw:text-style-name="P3" svg:width="0.2717in" svg:height="0.1768in" svg:x="3.0583in" svg:y="0.8906in"><draw:text-box><text:p text:style-name="P2"><text:span text:style-name="T2">0.76</text:span></text:p></draw:text-box></draw:frame><draw:polygon draw:style-name="gr2" draw:text-style-name="P1" svg:width="0.2657in" svg:height="0.176in" svg:x="4.6291in" svg:y="0.8835in" svg:viewBox="0 0 676 448" draw:points="0,448 676,448 676,0 0,0"><text:p/></draw:polygon><draw:frame draw:style-name="gr12" draw:text-style-name="P3" svg:width="0.2724in" svg:height="0.1768in" svg:x="3.7681in" svg:y="0.8906in"><draw:text-box><text:p text:style-name="P2"><text:span text:style-name="T2">0.84</text:span></text:p></draw:text-box></draw:frame><draw:polygon draw:style-name="gr2" draw:text-style-name="P1" svg:width="0.5772in" svg:height="0.1744in" svg:x="0.0193in" svg:y="1.0992in" svg:viewBox="0 0 1467 444" draw:points="0,444 1467,444 1467,0 0,0"><text:p/></draw:polygon><draw:frame draw:style-name="gr12" draw:text-style-name="P3" svg:width="0.2724in" svg:height="0.1768in" svg:x="4.6299in" svg:y="0.8906in"><draw:text-box><text:p text:style-name="P2"><text:span text:style-name="T2">0.63</text:span></text:p></draw:text-box></draw:frame><draw:polygon draw:style-name="gr2" draw:text-style-name="P1" svg:width="0.2661in" svg:height="0.1744in" svg:x="1.811in" svg:y="1.0992in" svg:viewBox="0 0 677 444" draw:points="0,444 677,444 677,0 0,0"><text:p/></draw:polygon><draw:frame draw:style-name="gr14" draw:text-style-name="P3" svg:width="0.5795in" svg:height="0.1768in" svg:x="0.0209in" svg:y="1.1051in"><draw:text-box><text:p text:style-name="P2"><text:span text:style-name="T2">HMMER</text:span></text:p></draw:text-box></draw:frame><draw:polygon draw:style-name="gr2" draw:text-style-name="P1" svg:width="0.2657in" svg:height="0.1744in" svg:x="2.539in" svg:y="1.0992in" svg:viewBox="0 0 676 444" draw:points="0,444 676,444 676,0 0,0"><text:p/></draw:polygon><draw:frame draw:style-name="gr11" draw:text-style-name="P3" svg:width="0.2717in" svg:height="0.1768in" svg:x="1.8118in" svg:y="1.1051in"><draw:text-box><text:p text:style-name="P2"><text:span text:style-name="T2">0.78</text:span></text:p></draw:text-box></draw:frame><draw:polygon draw:style-name="gr2" draw:text-style-name="P1" svg:width="0.2661in" svg:height="0.1744in" svg:x="3.0567in" svg:y="1.0992in" svg:viewBox="0 0 677 444" draw:points="0,444 677,444 677,0 0,0"><text:p/></draw:polygon><draw:frame draw:style-name="gr11" draw:text-style-name="P3" svg:width="0.2717in" svg:height="0.1768in" svg:x="2.5402in" svg:y="1.1051in"><draw:text-box><text:p text:style-name="P2"><text:span text:style-name="T2">0.69</text:span></text:p></draw:text-box></draw:frame><draw:polygon draw:style-name="gr2" draw:text-style-name="P1" svg:width="0.2673in" svg:height="0.1744in" svg:x="3.7665in" svg:y="1.0992in" svg:viewBox="0 0 680 444" draw:points="0,444 680,444 680,0 0,0"><text:p/></draw:polygon><draw:frame draw:style-name="gr11" draw:text-style-name="P3" svg:width="0.2717in" svg:height="0.1768in" svg:x="3.0583in" svg:y="1.1051in"><draw:text-box><text:p text:style-name="P2"><text:span text:style-name="T2">0.73</text:span></text:p></draw:text-box></draw:frame><draw:polygon draw:style-name="gr2" draw:text-style-name="P1" svg:width="0.2657in" svg:height="0.1744in" svg:x="4.6291in" svg:y="1.0992in" svg:viewBox="0 0 676 444" draw:points="0,444 676,444 676,0 0,0"><text:p/></draw:polygon><draw:frame draw:style-name="gr12" draw:text-style-name="P3" svg:width="0.2724in" svg:height="0.1768in" svg:x="3.7681in" svg:y="1.1051in"><draw:text-box><text:p text:style-name="P2"><text:span text:style-name="T2">0.81</text:span></text:p></draw:text-box></draw:frame><draw:polygon draw:style-name="gr2" draw:text-style-name="P1" svg:width="0.5701in" svg:height="0.176in" svg:x="0.0193in" svg:y="1.3126in" svg:viewBox="0 0 1449 448" draw:points="0,448 1449,448 1449,0 0,0"><text:p/></draw:polygon><draw:frame draw:style-name="gr12" draw:text-style-name="P3" svg:width="0.2724in" svg:height="0.1768in" svg:x="4.6299in" svg:y="1.1051in"><draw:text-box><text:p text:style-name="P2"><text:span text:style-name="T2">0.58</text:span></text:p></draw:text-box></draw:frame><draw:polygon draw:style-name="gr2" draw:text-style-name="P1" svg:width="0.2661in" svg:height="0.176in" svg:x="1.811in" svg:y="1.3126in" svg:viewBox="0 0 677 448" draw:points="0,448 677,448 677,0 0,0"><text:p/></draw:polygon><draw:frame draw:style-name="gr15" draw:text-style-name="P3" svg:width="0.5717in" svg:height="0.1768in" svg:x="0.0209in" svg:y="1.3197in"><draw:text-box><text:p text:style-name="P2"><text:span text:style-name="T2">BLAST+</text:span></text:p></draw:text-box></draw:frame><draw:polygon draw:style-name="gr2" draw:text-style-name="P1" svg:width="0.2657in" svg:height="0.176in" svg:x="2.539in" svg:y="1.3126in" svg:viewBox="0 0 676 448" draw:points="0,448 676,448 676,0 0,0"><text:p/></draw:polygon><draw:frame draw:style-name="gr11" draw:text-style-name="P3" svg:width="0.2717in" svg:height="0.1768in" svg:x="1.8118in" svg:y="1.3197in"><draw:text-box><text:p text:style-name="P2"><text:span text:style-name="T2">0.75</text:span></text:p></draw:text-box></draw:frame><draw:polygon draw:style-name="gr2" draw:text-style-name="P1" svg:width="0.2661in" svg:height="0.176in" svg:x="3.0567in" svg:y="1.3126in" svg:viewBox="0 0 677 448" draw:points="0,448 677,448 677,0 0,0"><text:p/></draw:polygon><draw:frame draw:style-name="gr11" draw:text-style-name="P3" svg:width="0.2717in" svg:height="0.1768in" svg:x="2.5402in" svg:y="1.3197in"><draw:text-box><text:p text:style-name="P2"><text:span text:style-name="T2">0.82</text:span></text:p></draw:text-box></draw:frame><draw:polygon draw:style-name="gr2" draw:text-style-name="P1" svg:width="0.2673in" svg:height="0.176in" svg:x="3.7665in" svg:y="1.3126in" svg:viewBox="0 0 680 448" draw:points="0,448 680,448 680,0 0,0"><text:p/></draw:polygon><draw:frame draw:style-name="gr11" draw:text-style-name="P3" svg:width="0.2717in" svg:height="0.1768in" svg:x="3.0583in" svg:y="1.3197in"><draw:text-box><text:p text:style-name="P2"><text:span text:style-name="T2">0.78</text:span></text:p></draw:text-box></draw:frame><draw:polygon draw:style-name="gr2" draw:text-style-name="P1" svg:width="0.2657in" svg:height="0.176in" svg:x="4.6291in" svg:y="1.3126in" svg:viewBox="0 0 676 448" draw:points="0,448 676,448 676,0 0,0"><text:p/></draw:polygon><draw:frame draw:style-name="gr12" draw:text-style-name="P3" svg:width="0.2724in" svg:height="0.1768in" svg:x="3.7681in" svg:y="1.3197in"><draw:text-box><text:p text:style-name="P2"><text:span text:style-name="T2">0.83</text:span></text:p></draw:text-box></draw:frame><draw:polygon draw:style-name="gr2" draw:text-style-name="P1" svg:width="0.3228in" svg:height="0.1744in" svg:x="0.0193in" svg:y="1.528in" svg:viewBox="0 0 821 444" draw:points="0,444 821,444 821,0 0,0"><text:p/></draw:polygon><draw:frame draw:style-name="gr12" draw:text-style-name="P3" svg:width="0.2724in" svg:height="0.1768in" svg:x="4.6299in" svg:y="1.3197in"><draw:text-box><text:p text:style-name="P2"><text:span text:style-name="T2">0.61</text:span></text:p></draw:text-box></draw:frame><draw:polygon draw:style-name="gr2" draw:text-style-name="P1" svg:width="0.2661in" svg:height="0.1744in" svg:x="1.811in" svg:y="1.528in" svg:viewBox="0 0 677 444" draw:points="0,444 677,444 677,0 0,0"><text:p/></draw:polygon><draw:frame draw:style-name="gr16" draw:text-style-name="P3" svg:width="0.3268in" svg:height="0.1768in" svg:x="0.0209in" svg:y="1.5343in"><draw:text-box><text:p text:style-name="P2"><text:span text:style-name="T2">Pfam</text:span></text:p></draw:text-box></draw:frame><draw:polygon draw:style-name="gr2" draw:text-style-name="P1" svg:width="0.2657in" svg:height="0.1744in" svg:x="2.539in" svg:y="1.528in" svg:viewBox="0 0 676 444" draw:points="0,444 676,444 676,0 0,0"><text:p/></draw:polygon><draw:frame draw:style-name="gr11" draw:text-style-name="P3" svg:width="0.2717in" svg:height="0.1768in" svg:x="1.8118in" svg:y="1.5343in"><draw:text-box><text:p text:style-name="P2"><text:span text:style-name="T2">0.81</text:span></text:p></draw:text-box></draw:frame><draw:polygon draw:style-name="gr2" draw:text-style-name="P1" svg:width="0.2661in" svg:height="0.1744in" svg:x="3.0567in" svg:y="1.528in" svg:viewBox="0 0 677 444" draw:points="0,444 677,444 677,0 0,0"><text:p/></draw:polygon><draw:frame draw:style-name="gr11" draw:text-style-name="P3" svg:width="0.2717in" svg:height="0.1768in" svg:x="2.5402in" svg:y="1.5343in"><draw:text-box><text:p text:style-name="P2"><text:span text:style-name="T2">0.64</text:span></text:p></draw:text-box></draw:frame><draw:polygon draw:style-name="gr2" draw:text-style-name="P1" svg:width="0.2673in" svg:height="0.1744in" svg:x="3.7665in" svg:y="1.528in" svg:viewBox="0 0 680 444" draw:points="0,444 680,444 680,0 0,0"><text:p/></draw:polygon><draw:frame draw:style-name="gr11" draw:text-style-name="P3" svg:width="0.2717in" svg:height="0.1768in" svg:x="3.0583in" svg:y="1.5343in"><draw:text-box><text:p text:style-name="P2"><text:span text:style-name="T2">0.71</text:span></text:p></draw:text-box></draw:frame><draw:polygon draw:style-name="gr2" draw:text-style-name="P1" svg:width="0.2657in" svg:height="0.1744in" svg:x="4.6291in" svg:y="1.528in" svg:viewBox="0 0 676 444" draw:points="0,444 676,444 676,0 0,0"><text:p/></draw:polygon><draw:frame draw:style-name="gr12" draw:text-style-name="P3" svg:width="0.2724in" svg:height="0.1768in" svg:x="3.7681in" svg:y="1.5343in"><draw:text-box><text:p text:style-name="P2"><text:span text:style-name="T2">0.79</text:span></text:p></draw:text-box></draw:frame><draw:polygon draw:style-name="gr2" draw:text-style-name="P1" svg:width="0.5508in" svg:height="0.1756in" svg:x="0.0193in" svg:y="1.7421in" svg:viewBox="0 0 1400 447" draw:points="0,447 1400,447 1400,0 0,0"><text:p/></draw:polygon><draw:frame draw:style-name="gr12" draw:text-style-name="P3" svg:width="0.2724in" svg:height="0.1768in" svg:x="4.6299in" svg:y="1.5343in"><draw:text-box><text:p text:style-name="P2"><text:span text:style-name="T2">0.56</text:span></text:p></draw:text-box></draw:frame><draw:polygon draw:style-name="gr2" draw:text-style-name="P1" svg:width="0.0504in" svg:height="0.1756in" svg:x="0.5709in" svg:y="1.7421in" svg:viewBox="0 0 129 447" draw:points="0,447 129,447 129,0 0,0"><text:p/></draw:polygon><draw:polygon draw:style-name="gr2" draw:text-style-name="P1" svg:width="0.4579in" svg:height="0.1756in" svg:x="0.622in" svg:y="1.7421in" svg:viewBox="0 0 1164 447" draw:points="0,447 1164,447 1164,0 0,0"><text:p/></draw:polygon><draw:polygon draw:style-name="gr2" draw:text-style-name="P1" svg:width="0.2661in" svg:height="0.1756in" svg:x="1.811in" svg:y="1.7421in" svg:viewBox="0 0 677 447" draw:points="0,447 677,447 677,0 0,0"><text:p/></draw:polygon><draw:frame draw:style-name="gr17" draw:text-style-name="P3" svg:width="1.0689in" svg:height="0.1768in" svg:x="0.0209in" svg:y="1.7488in"><draw:text-box><text:p text:style-name="P2"><text:span text:style-name="T2">eggNOG-mapper</text:span></text:p></draw:text-box></draw:frame><draw:polygon draw:style-name="gr2" draw:text-style-name="P1" svg:width="0.2657in" svg:height="0.1756in" svg:x="2.539in" svg:y="1.7421in" svg:viewBox="0 0 676 447" draw:points="0,447 676,447 676,0 0,0"><text:p/></draw:polygon><draw:frame draw:style-name="gr11" draw:text-style-name="P3" svg:width="0.2717in" svg:height="0.1768in" svg:x="1.8118in" svg:y="1.7488in"><draw:text-box><text:p text:style-name="P2"><text:span text:style-name="T2">0.73</text:span></text:p></draw:text-box></draw:frame><draw:polygon draw:style-name="gr2" draw:text-style-name="P1" svg:width="0.2661in" svg:height="0.1756in" svg:x="3.0567in" svg:y="1.7421in" svg:viewBox="0 0 677 447" draw:points="0,447 677,447 677,0 0,0"><text:p/></draw:polygon><draw:frame draw:style-name="gr11" draw:text-style-name="P3" svg:width="0.2717in" svg:height="0.1768in" svg:x="2.5402in" svg:y="1.7488in"><draw:text-box><text:p text:style-name="P2"><text:span text:style-name="T2">0.76</text:span></text:p></draw:text-box></draw:frame><draw:polygon draw:style-name="gr2" draw:text-style-name="P1" svg:width="0.2673in" svg:height="0.1756in" svg:x="3.7665in" svg:y="1.7421in" svg:viewBox="0 0 680 447" draw:points="0,447 680,447 680,0 0,0"><text:p/></draw:polygon><draw:frame draw:style-name="gr11" draw:text-style-name="P3" svg:width="0.2717in" svg:height="0.1768in" svg:x="3.0583in" svg:y="1.7488in"><draw:text-box><text:p text:style-name="P2"><text:span text:style-name="T2">0.74</text:span></text:p></draw:text-box></draw:frame><draw:polygon draw:style-name="gr2" draw:text-style-name="P1" svg:width="0.2657in" svg:height="0.1756in" svg:x="4.6291in" svg:y="1.7421in" svg:viewBox="0 0 676 447" draw:points="0,447 676,447 676,0 0,0"><text:p/></draw:polygon><draw:frame draw:style-name="gr12" draw:text-style-name="P3" svg:width="0.2724in" svg:height="0.1768in" svg:x="3.7681in" svg:y="1.7488in"><draw:text-box><text:p text:style-name="P2"><text:span text:style-name="T2">0.80</text:span></text:p></draw:text-box></draw:frame><draw:polygon draw:style-name="gr2" draw:text-style-name="P1" svg:width="0.5606in" svg:height="0.1744in" svg:x="0.0193in" svg:y="1.9571in" svg:viewBox="0 0 1425 444" draw:points="0,444 1425,444 1425,0 0,0"><text:p/></draw:polygon><draw:frame draw:style-name="gr12" draw:text-style-name="P3" svg:width="0.2724in" svg:height="0.1768in" svg:x="4.6299in" svg:y="1.7488in"><draw:text-box><text:p text:style-name="P2"><text:span text:style-name="T2">0.55</text:span></text:p></draw:text-box></draw:frame><draw:polygon draw:style-name="gr2" draw:text-style-name="P1" svg:width="0.2661in" svg:height="0.1744in" svg:x="1.811in" svg:y="1.9571in" svg:viewBox="0 0 677 444" draw:points="0,444 677,444 677,0 0,0"><text:p/></draw:polygon><draw:frame draw:style-name="gr18" draw:text-style-name="P3" svg:width="0.563in" svg:height="0.1768in" svg:x="0.0209in" svg:y="1.9634in"><draw:text-box><text:p text:style-name="P2"><text:span text:style-name="T2">DeepFRI</text:span></text:p></draw:text-box></draw:frame><draw:polygon draw:style-name="gr2" draw:text-style-name="P1" svg:width="0.2657in" svg:height="0.1744in" svg:x="2.539in" svg:y="1.9571in" svg:viewBox="0 0 676 444" draw:points="0,444 676,444 676,0 0,0"><text:p/></draw:polygon><draw:frame draw:style-name="gr11" draw:text-style-name="P3" svg:width="0.2717in" svg:height="0.1768in" svg:x="1.8118in" svg:y="1.9634in"><draw:text-box><text:p text:style-name="P2"><text:span text:style-name="T2">0.84</text:span></text:p></draw:text-box></draw:frame><draw:polygon draw:style-name="gr2" draw:text-style-name="P1" svg:width="0.2661in" svg:height="0.1744in" svg:x="3.0567in" svg:y="1.9571in" svg:viewBox="0 0 677 444" draw:points="0,444 677,444 677,0 0,0"><text:p/></draw:polygon><draw:frame draw:style-name="gr11" draw:text-style-name="P3" svg:width="0.2717in" svg:height="0.1768in" svg:x="2.5402in" svg:y="1.9634in"><draw:text-box><text:p text:style-name="P2"><text:span text:style-name="T2">0.79</text:span></text:p></draw:text-box></draw:frame><draw:polygon draw:style-name="gr2" draw:text-style-name="P1" svg:width="0.2673in" svg:height="0.1744in" svg:x="3.7665in" svg:y="1.9571in" svg:viewBox="0 0 680 444" draw:points="0,444 680,444 680,0 0,0"><text:p/></draw:polygon><draw:frame draw:style-name="gr11" draw:text-style-name="P3" svg:width="0.2717in" svg:height="0.1768in" svg:x="3.0583in" svg:y="1.9634in"><draw:text-box><text:p text:style-name="P2"><text:span text:style-name="T2">0.81</text:span></text:p></draw:text-box></draw:frame><draw:polygon draw:style-name="gr2" draw:text-style-name="P1" svg:width="0.2657in" svg:height="0.1744in" svg:x="4.6291in" svg:y="1.9571in" svg:viewBox="0 0 676 444" draw:points="0,444 676,444 676,0 0,0"><text:p/></draw:polygon><draw:frame draw:style-name="gr12" draw:text-style-name="P3" svg:width="0.2724in" svg:height="0.1768in" svg:x="3.7681in" svg:y="1.9634in"><draw:text-box><text:p text:style-name="P2"><text:span text:style-name="T2">0.87</text:span></text:p></draw:text-box></draw:frame><draw:line draw:style-name="gr19" draw:text-style-name="P4" svg:x1="6.6921in" svg:y1="2.2567in" svg:x2="0in" svg:y2="2.2567in"><text:p/></draw:line><draw:line draw:style-name="gr19" draw:text-style-name="P4" svg:x1="6.6921in" svg:y1="2.2496in" svg:x2="0in" svg:y2="2.2496in"><text:p/></draw:line><draw:frame draw:style-name="gr12" draw:text-style-name="P3" svg:width="0.2724in" svg:height="0.1768in" svg:x="4.6299in" svg:y="1.9634in"><draw:text-box><text:p text:style-name="P2"><text:span text:style-name="T2">0.68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9T19:11:49.634000000</meta:creation-date>
    <dc:date>2026-04-29T19:12:15.687000000</dc:date>
    <meta:editing-duration>PT26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